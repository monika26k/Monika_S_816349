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color="#000000" fo:font-size="12pt" style:text-underline-style="none" fo:font-weight="normal" officeooo:rsid="0002c327" officeooo:paragraph-rsid="0002c327" fo:background-color="transparent" style:font-size-asian="10.5pt" style:font-weight-asian="normal" style:font-size-complex="12pt" style:font-weight-complex="normal"/>
    </style:style>
    <style:style style:name="P2" style:family="paragraph" style:parent-style-name="Standard">
      <style:paragraph-properties fo:text-align="center" style:justify-single-word="false"/>
      <style:text-properties fo:color="#000000" fo:font-size="15pt" style:text-underline-style="none" fo:font-weight="bold" officeooo:rsid="0002c327" fo:background-color="transparent"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size="14pt" fo:font-weight="normal" officeooo:rsid="0002c327" officeooo:paragraph-rsid="0002c327"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bold" officeooo:rsid="0002c327" officeooo:paragraph-rsid="0002c327"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22pt" fo:font-weight="bold" officeooo:rsid="0002c327" officeooo:paragraph-rsid="0002c327" style:font-size-asian="22pt" style:font-weight-asian="bold" style:font-size-complex="22pt" style:font-weight-complex="bold"/>
    </style:style>
    <style:style style:name="T1" style:family="text">
      <style:text-properties officeooo:rsid="00043bbd"/>
    </style:style>
    <style:style style:name="T2" style:family="text">
      <style:text-properties fo:font-size="14pt" style:font-size-asian="14pt" style:font-size-complex="14pt"/>
    </style:style>
    <style:style style:name="T3"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D</text:span>OCKER</text:p>
      <text:p text:style-name="P4"/>
      <text:p text:style-name="P3">Docker can reduce the size of development by providing a smaller operation system.</text:p>
      <text:p text:style-name="P3">It is easier applications and deploy anywhere on any physical and virtual machines, even on the cloud.</text:p>
      <text:p text:style-name="P3">It is scalable and light weighted.</text:p>
      <text:p text:style-name="P3"/>
      <text:p text:style-name="P4">INSTALLATION</text:p>
      <text:p text:style-name="P3">1)<text:tab/>Before installing Docker, you first must ensure that you have the right Linux kernel version running. Docker is only designed to run on Linux kernel version 3.8 and higher. We can do this by running the following command.</text:p>
      <text:p text:style-name="P3">2)<text:tab/>uname -a</text:p>
      <text:p text:style-name="P3">3)<text:tab/>apt-get</text:p>
      <text:p text:style-name="P3">4)<text:tab/>sudo apt-get update</text:p>
      <text:p text:style-name="P3"/>
      <text:p text:style-name="P3">5)<text:tab/>The next step is to install the necessary certificates that will be required to work:</text:p>
      <text:p text:style-name="P3">6)<text:tab/>sudo apt-get install apt-transport-https ca-certificates</text:p>
      <text:p text:style-name="P3"/>
      <text:p text:style-name="P3">7)<text:tab/>The next step is to add the new GPG key. This key is required to ensure that all data is encrypted when downloading the necessary packages for Docker.</text:p>
      <text:p text:style-name="P3">8)<text:tab/>The following command will download the key with the ID 58118E89F3A912897C070ADBF76221572C52609D from the keyserver hkp://ha.pool.sks-keyservers.net:80 and adds it to the adv keychain. Please note that this particular key is required to download the necessary Docker packages.</text:p>
      <text:p text:style-name="P3">9)<text:tab/>echo "deb https://apt.dockerproject.org/repo ubuntu-trusty main” </text:p>
      <text:p text:style-name="P3">i)<text:tab/>| sudo tee /etc/apt/sources.list.d/docker.list</text:p>
      <text:p text:style-name="P3"/>
      <text:p text:style-name="P3">10)<text:tab/>apt-get update command:</text:p>
      <text:p text:style-name="P3"/>
      <text:p text:style-name="P3">11)<text:tab/>apt-cache policy docker-engine</text:p>
      <text:p text:style-name="P3"/>
      <text:p text:style-name="P3">12)<text:tab/>sudo apt-get install linux-image-extra-$(uname -r) </text:p>
      <text:p text:style-name="P3">i)<text:tab/>linux-image-extra-virtual</text:p>
      <text:p text:style-name="P3">13)<text:tab/>The final step is to install Docker and we can do this with the following command </text:p>
      <text:p text:style-name="P3">14)<text:tab/>sudo apt-get install –y docker-engine</text:p>
      <text:p text:style-name="P4"/>
      <text:p text:style-name="P4"/>
      <text:p text:style-name="P4">CONTAINER</text:p>
      <text:p text:style-name="P3">Containers are instances of Docker images that can be run using the Docker run command. The basic purpose of Docker is to run containers. Let’s discuss how to work with containers.</text:p>
      <text:p text:style-name="P3"/>
      <text:p text:style-name="P4"><text:soft-page-break/>Running a Container</text:p>
      <text:p text:style-name="P3">Running of containers is managed with the Docker run command. To run a container in an interactive mode, first launch the Docker container.</text:p>
      <text:p text:style-name="P3">sudo docker run –it centos /bin/bash </text:p>
      <text:p text:style-name="P4"/>
      <text:p text:style-name="P4">To list the containers</text:p>
      <text:p text:style-name="P3">sudo docker ps</text:p>
      <text:p text:style-name="P3"/>
      <text:p text:style-name="P4">Docker History</text:p>
      <text:p text:style-name="P3">With this command, you can see all the commands that were run with an image via a container.</text:p>
      <text:p text:style-name="P3">docker history ImageID </text:p>
      <text:p text:style-name="P4"/>
      <text:p text:style-name="P4">Virtual Machine</text:p>
      <text:p text:style-name="P3">A virtual machine is a software that allows us to install. The operating system in which virtual machine runs are called virtualized operating systems. </text:p>
      <text:p text:style-name="P4"/>
      <text:p text:style-name="P4">Advantages of Docker</text:p>
      <text:p text:style-name="P3">o<text:tab/>It runs the container in seconds instead of minutes.</text:p>
      <text:p text:style-name="P3">o<text:tab/>It uses less memory.</text:p>
      <text:p text:style-name="P3">o<text:tab/>It provides lightweight virtualization.</text:p>
      <text:p text:style-name="P3">o<text:tab/>It does not a require full operating system to run applications.</text:p>
      <text:p text:style-name="P3">o<text:tab/>It uses application dependencies to reduce the risk.</text:p>
      <text:p text:style-name="P3">o<text:tab/>Docker allows you to use a remote repository to share your container with others.</text:p>
      <text:p text:style-name="P3">o<text:tab/>It provides continuous deployment and testing environment.</text:p>
      <text:p text:style-name="P3"/>
      <text:p text:style-name="P4">Disadvantages of Docker</text:p>
      <text:p text:style-name="P3">o<text:tab/>It increases complexity due to an additional layer.</text:p>
      <text:p text:style-name="P3">o<text:tab/>In Docker, it is difficult to manage large amount of containers.</text:p>
      <text:p text:style-name="P3">o<text:tab/>Some features such as container self -registration, containers self-inspects, copying files form host to the container, and more are missing in the Docker.</text:p>
      <text:p text:style-name="P3">o<text:tab/>Docker is not a good solution for applications that require rich graphical interface.</text:p>
      <text:p text:style-name="P3">o<text:tab/>Docker provides cross-platform compatibility means if an application is designed to run in a Docker container on Windows, then it can't run on Linux or vice versa.</text:p>
      <text:p text:style-name="P3"/>
      <text:p text:style-name="P4">Docker Engine</text:p>
      <text:p text:style-name="P3">o<text:tab/>A server which is a type of long-running program called a daemon process.</text:p>
      <text:p text:style-name="P4"><text:span text:style-name="T3">o<text:tab/>The REST API is used to specify programs can use to talk to the daemon and instruct it what to do</text:span>.</text:p>
      <text:p text:style-name="P4"/>
      <text:p text:style-name="P4">Docker Push Repository</text:p>
      <text:p text:style-name="P3"><text:soft-page-break/>We can push our Docker image to global repository. It is a public repository provided by Docker officially. It allows us to put our docker image on the server. It is helpful when we want to access our docker image from global. </text:p>
      <text:p text:style-name="P3">We need to login to our account of Docker hub. If you don't have, create it first.</text:p>
      <text:p text:style-name="P3">$ docker login <text:s/></text:p>
      <text:p text:style-name="P4"/>
      <text:p text:style-name="P4">Tag Docker Image</text:p>
      <text:p text:style-name="P3">After login, we need to tag our docker image that we want to push. Following command is used to tag the docker image.</text:p>
      <text:p text:style-name="P3">$ docker tag image-name username/image-name </text:p>
      <text:p text:style-name="P3"/>
      <text:p text:style-name="P4">Push Docker Image</text:p>
      <text:p text:style-name="P4"><text:span text:style-name="T3">$ docker push <text:s/>username/image-nam</text:span>e <text:s/></text:p>
      <text:p text:style-name="P4"/>
      <text:p text:style-name="P4">Check Docker version</text:p>
      <text:p text:style-name="P3">$ docker version <text:s/></text:p>
      <text:p text:style-name="P3"/>
      <text:p text:style-name="P4">Build Docker Image from a Docker-file</text:p>
      <text:p text:style-name="P3">$ docker build -t image-name docker-file-location <text:s/></text:p>
      <text:p text:style-name="P4"/>
      <text:p text:style-name="P4">Run Docker Image</text:p>
      <text:p text:style-name="P3">$ docker run -d image-name <text:s/></text:p>
      <text:p text:style-name="P4"/>
      <text:p text:style-name="P4">Check available Docker images</text:p>
      <text:p text:style-name="P3">$ docker images <text:s/></text:p>
      <text:p text:style-name="P4"/>
      <text:p text:style-name="P4">Check for latest running container</text:p>
      <text:p text:style-name="P3">$ docker ps -l <text:s/></text:p>
      <text:p text:style-name="P4"/>
      <text:p text:style-name="P4">Check all running containers</text:p>
      <text:p text:style-name="P3">$ docker ps -a <text:s/></text:p>
      <text:p text:style-name="P4"/>
      <text:p text:style-name="P4">Stop running container</text:p>
      <text:p text:style-name="P3">$ docker stop container_id <text:s/></text:p>
      <text:p text:style-name="P4"/>
      <text:p text:style-name="P4">Delete an image</text:p>
      <text:p text:style-name="P3">$ docker rmi image-name <text:s/></text:p>
      <text:p text:style-name="P4"/>
      <text:p text:style-name="P4">Delete all images</text:p>
      <text:p text:style-name="P3">$ docker rmi $(docker images -q) <text:s/></text:p>
      <text:p text:style-name="P4"/>
      <text:p text:style-name="P4">Delete all images forcefully</text:p>
      <text:p text:style-name="P3">$ docker rmi -r $(docker images -q) <text:s/></text:p>
      <text:p text:style-name="P4"/>
      <text:p text:style-name="P4">Delete all containers</text:p>
      <text:p text:style-name="P3"><text:soft-page-break/>$ docker rm $(docker ps -a -q) <text:s/></text:p>
      <text:p text:style-name="P4"/>
      <text:p text:style-name="P4">Enter Docker container</text:p>
      <text:p text:style-name="P3">$ docker exec -it container-id bash</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0T10:57:48.857964594</meta:creation-date>
    <meta:editing-duration>PT5M50S</meta:editing-duration>
    <meta:editing-cycles>2</meta:editing-cycles>
    <meta:generator>LibreOffice/6.4.7.2$Linux_X86_64 LibreOffice_project/40$Build-2</meta:generator>
    <dc:date>2022-03-10T11:03:34.238018485</dc:date>
    <meta:document-statistic meta:table-count="0" meta:image-count="0" meta:object-count="0" meta:page-count="4" meta:paragraph-count="83" meta:word-count="745" meta:character-count="4528" meta:non-whitespace-character-count="3831"/>
  </office:meta>
</office:document-meta>
</file>